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/>
    </style:style>
    <style:style style:name="ce2" style:family="table-cell" style:parent-style-name="Default">
      <style:text-properties style:font-name="Liberation Serif" style:font-name-asian="DejaVu Sans" style:font-name-complex="Noto Sans Arabi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cket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lafon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montant plafond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em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Num_Ticket</text:p>
          </table:table-cell>
          <table:table-cell table:style-name="Default" office:value-type="string" calcext:value-type="string">
            <text:p>item</text:p>
          </table:table-cell>
          <table:table-cell table:style-name="ce1" office:value-type="string" calcext:value-type="string">
            <text:p>mvt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mode_reouverture</text:p>
          </table:table-cell>
          <table:table-cell office:value-type="string" calcext:value-type="string">
            <text:p>est reouverture</text:p>
          </table:table-cell>
          <table:table-cell table:style-name="ce2" office:value-type="string" calcext:value-type="string">
            <text:p>etat_retablir</text:p>
          </table:table-cell>
          <table:table-cell office:value-type="string" calcext:value-type="string">
            <text:p>cout entrer</text:p>
          </table:table-cell>
          <table:table-cell office:value-type="string" calcext:value-type="string">
            <text:p>cout correct pris</text:p>
          </table:table-cell>
          <table:table-cell office:value-type="string" calcext:value-type="string">
            <text:p>montant plafond</text:p>
          </table:table-cell>
          <table:table-cell office:value-type="string" calcext:value-type="string">
            <text:p>montant res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lose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$D$8]*[.$E$1]/100" office:value-type="float" office:value="200" calcext:value-type="float">
            <text:p>200</text:p>
          </table:table-cell>
          <table:table-cell table:formula="of:=[.I7]*[.$E$1]/10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close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$D$8]*[.$E$1]/100" office:value-type="float" office:value="200" calcext:value-type="float">
            <text:p>200</text:p>
          </table:table-cell>
          <table:table-cell table:formula="of:=[.I8]*[.$E$1]/10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*[.$D$7]/10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$D$8]*[.$E$1]/100" office:value-type="float" office:value="200" calcext:value-type="float">
            <text:p>200</text:p>
          </table:table-cell>
          <table:table-cell table:formula="of:=([.J9]-([.I9]*[.F9]))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0]*[.$D$8]/10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$D$8]*[.$E$1]/100" office:value-type="float" office:value="200" calcext:value-type="float">
            <text:p>200</text:p>
          </table:table-cell>
          <table:table-cell table:formula="of:=([.J10]-([.I10]*[.F10]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l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D$8]*[.$E$1]/100" office:value-type="float" office:value="200" calcext:value-type="float">
            <text:p>200</text:p>
          </table:table-cell>
          <table:table-cell table:formula="of:=([.K9]-([.I11]*[.F11]))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cl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D$8]*[.$E$1]/100" office:value-type="float" office:value="200" calcext:value-type="float">
            <text:p>200</text:p>
          </table:table-cell>
          <table:table-cell table:formula="of:=([.K10]-([.I12]*[.F12]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3]*[.$D$7]/100"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formula="of:=[.$D$8]*[.$E$1]/100" office:value-type="float" office:value="200" calcext:value-type="float">
            <text:p>200</text:p>
          </table:table-cell>
          <table:table-cell table:formula="of:=([.K11]-([.I13]*[.F13])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*[.$D$8]/100"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formula="of:=[.$D$8]*[.$E$1]/100" office:value-type="float" office:value="200" calcext:value-type="float">
            <text:p>200</text:p>
          </table:table-cell>
          <table:table-cell table:formula="of:=([.K12]-([.I14]*[.F1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los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formula="of:=([.$D$8]+[.$D$15])*[.$E$1]/100" office:value-type="float" office:value="300" calcext:value-type="float">
            <text:p>300</text:p>
          </table:table-cell>
          <table:table-cell table:formula="of:=([.K13]-([.I15]*[.F15]))+([.J15]-[.J13])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clos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formula="of:=([.$D$8]+[.$D$16])*[.$E$1]/100" office:value-type="float" office:value="300" calcext:value-type="float">
            <text:p>300</text:p>
          </table:table-cell>
          <table:table-cell table:formula="of:=([.K14]-([.I16]*[.F16]))+([.J16]-[.J1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7]*[.$D$7]/10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([.$D$8]+[.$D$15])*[.$E$1]/100" office:value-type="float" office:value="300" calcext:value-type="float">
            <text:p>300</text:p>
          </table:table-cell>
          <table:table-cell table:formula="of:=([.K15]-[.I17])+([.J17]-[.J15])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8]*[.$D$8]/10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([.$D$8]+[.$D$16])*[.$E$1]/100" office:value-type="float" office:value="300" calcext:value-type="float">
            <text:p>300</text:p>
          </table:table-cell>
          <table:table-cell table:formula="of:=([.K16]-[.I18])+([.J18]-[.J16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l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9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)*[.$E$1]/100" office:value-type="float" office:value="300" calcext:value-type="float">
            <text:p>300</text:p>
          </table:table-cell>
          <table:table-cell table:formula="of:=([.K17]-[.I19])+([.J19]-[.J17])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cl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0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)*[.$E$1]/100" office:value-type="float" office:value="300" calcext:value-type="float">
            <text:p>300</text:p>
          </table:table-cell>
          <table:table-cell table:formula="of:=([.K18]-[.I20])+([.J20]-[.J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1]*[.$D$8]/100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([.$D$8]+[.$D$16])*[.$E$1]/100" office:value-type="float" office:value="300" calcext:value-type="float">
            <text:p>300</text:p>
          </table:table-cell>
          <table:table-cell table:formula="of:=([.K19]-[.I21])+([.J21]-[.J1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2]*[.$D$8]/100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([.$D$8]+[.$D$16])*[.$E$1]/100" office:value-type="float" office:value="300" calcext:value-type="float">
            <text:p>300</text:p>
          </table:table-cell>
          <table:table-cell table:formula="of:=([.K20]-[.I22])+([.J22]-[.J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los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3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formula="of:=([.$D$8]+[.$D$16]+[.$D$23])*[.$E$1]/100" office:value-type="float" office:value="400" calcext:value-type="float">
            <text:p>400</text:p>
          </table:table-cell>
          <table:table-cell table:formula="of:=([.K21]-([.I23]*[.F23]))+([.J23]-[.J21])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clos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4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formula="of:=([.$D$8]+[.$D$16]+[.$D$24])*[.$E$1]/100" office:value-type="float" office:value="400" calcext:value-type="float">
            <text:p>400</text:p>
          </table:table-cell>
          <table:table-cell table:formula="of:=([.K22]-([.I24]*[.F24]))+([.J24]-[.J2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7]+[.D11]+[.D15]+[.D19]+[.D23])/5)*[.D25]/100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([.$D$8]+[.$D$16]+[.$D$23])*[.$E$1]/100" office:value-type="float" office:value="400" calcext:value-type="float">
            <text:p>400</text:p>
          </table:table-cell>
          <table:table-cell table:formula="of:=([.K23]-[.I25])+([.J25]-[.J23])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8]+[.D12]+[.D16]+[.D20]+[.D24])/5)*[.D26]/100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([.$D$8]+[.$D$16]+[.$D$24])*[.$E$1]/100" office:value-type="float" office:value="400" calcext:value-type="float">
            <text:p>400</text:p>
          </table:table-cell>
          <table:table-cell table:formula="of:=([.K24]-[.I26])+([.J26]-[.J24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los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7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formula="of:=([.$D$8]+[.$D$16]+[.$D$24]+[.$D$27])*[.$E$1]/100" office:value-type="float" office:value="500" calcext:value-type="float">
            <text:p>500</text:p>
          </table:table-cell>
          <table:table-cell table:formula="of:=([.K25]-([.I27]*[.F27]))+([.J27]-[.J25])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clos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8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formula="of:=([.$D$8]+[.$D$16]+[.$D$24]+[.$D$28])*[.$E$1]/100" office:value-type="float" office:value="500" calcext:value-type="float">
            <text:p>500</text:p>
          </table:table-cell>
          <table:table-cell table:formula="of:=([.K26]-([.I28]*[.F28]))+([.J28]-[.J26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uler L27 et L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29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+[.$D$24])*[.$E$1]/100" office:value-type="float" office:value="400" calcext:value-type="float">
            <text:p>400</text:p>
          </table:table-cell>
          <table:table-cell table:formula="of:=([.K27]-[.I29])+([.J29]-[.J27])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nuler L27 et L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0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+[.$D$24])*[.$E$1]/100" office:value-type="float" office:value="400" calcext:value-type="float">
            <text:p>400</text:p>
          </table:table-cell>
          <table:table-cell table:formula="of:=([.K28]-[.I30])+([.J30]-[.J28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l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1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+[.$D$24])*[.$E$1]/100" office:value-type="float" office:value="400" calcext:value-type="float">
            <text:p>400</text:p>
          </table:table-cell>
          <table:table-cell table:formula="of:=([.K29]-[.I31])+([.J31]-[.J29])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cl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2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+[.$D$24])*[.$E$1]/100" office:value-type="float" office:value="400" calcext:value-type="float">
            <text:p>400</text:p>
          </table:table-cell>
          <table:table-cell table:formula="of:=([.K30]-[.I32])+([.J32]-[.J30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3]*[.$D$8]/100"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table:formula="of:=([.$D$8]+[.$D$16]+[.$D$24]+[.$D$27])*[.$E$1]/100" office:value-type="float" office:value="500" calcext:value-type="float">
            <text:p>500</text:p>
          </table:table-cell>
          <table:table-cell table:formula="of:=([.K31]-[.I33])+([.J33]-[.J3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4]*[.$D$8]/100"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table:formula="of:=([.$D$8]+[.$D$16]+[.$D$24]+[.$D$27])*[.$E$1]/100" office:value-type="float" office:value="500" calcext:value-type="float">
            <text:p>500</text:p>
          </table:table-cell>
          <table:table-cell table:formula="of:=([.K32]-[.I34])+([.J34]-[.J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cl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5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+[.$D$24]+[.$D$27])*[.$E$1]/100" office:value-type="float" office:value="500" calcext:value-type="float">
            <text:p>500</text:p>
          </table:table-cell>
          <table:table-cell table:formula="of:=([.K33]-[.I35])+([.J35]-[.J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string" calcext:value-type="string">
            <text:p>cl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6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+[.$D$24]+[.$D$27])*[.$E$1]/100" office:value-type="float" office:value="500" calcext:value-type="float">
            <text:p>500</text:p>
          </table:table-cell>
          <table:table-cell table:formula="of:=([.K34]-[.I36])+([.J36]-[.J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etablir L27 et L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7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+[.$D$24]+[.$D$27])*[.$E$1]/100" office:value-type="float" office:value="500" calcext:value-type="float">
            <text:p>500</text:p>
          </table:table-cell>
          <table:table-cell table:formula="of:=([.K35]-[.I37])+([.J37]-[.J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etablir L27 et L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8]*[.$D$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D$8]+[.$D$16]+[.$D$24]+[.$D$27])*[.$E$1]/100" office:value-type="float" office:value="500" calcext:value-type="float">
            <text:p>500</text:p>
          </table:table-cell>
          <table:table-cell table:formula="of:=([.K36]-[.I38])+([.J38]-[.J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 style:data-style-name="N2" text:time-value="06:06:22.818494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2T14:21:05.094963202</meta:creation-date>
    <dc:date>2026-06-23T07:06:21.681155319</dc:date>
    <meta:editing-duration>PT9M18S</meta:editing-duration>
    <meta:editing-cycles>2</meta:editing-cycles>
    <meta:generator>LibreOffice/25.8.7.3$Linux_X86_64 LibreOffice_project/580$Build-3</meta:generator>
    <meta:document-statistic meta:table-count="1" meta:cell-count="375" meta:object-count="0"/>
  </office:meta>
</office:document-meta>
</file>